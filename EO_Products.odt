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da67" officeooo:paragraph-rsid="001fda67"/>
    </style:style>
    <style:style style:name="P2" style:family="paragraph" style:parent-style-name="Standard">
      <style:text-properties officeooo:rsid="001fda67" officeooo:paragraph-rsid="001fda67"/>
    </style:style>
    <style:style style:name="P3" style:family="paragraph" style:parent-style-name="Standard">
      <style:text-properties officeooo:rsid="00223856" officeooo:paragraph-rsid="00223856"/>
    </style:style>
    <style:style style:name="P4" style:family="paragraph" style:parent-style-name="Standard">
      <style:text-properties style:text-underline-style="solid" style:text-underline-width="auto" style:text-underline-color="font-color" fo:font-weight="bold" officeooo:rsid="00223856" officeooo:paragraph-rsid="00223856" style:font-weight-asian="bold" style:font-weight-complex="bold"/>
    </style:style>
    <style:style style:name="P5" style:family="paragraph" style:parent-style-name="Standard">
      <style:text-properties officeooo:paragraph-rsid="00223856"/>
    </style:style>
    <style:style style:name="P6" style:family="paragraph" style:parent-style-name="Standard">
      <style:text-properties fo:font-weight="bold" officeooo:paragraph-rsid="001fda67" style:font-weight-asian="bold" style:font-weight-complex="bold"/>
    </style:style>
    <style:style style:name="P7" style:family="paragraph" style:parent-style-name="Standard">
      <style:text-properties fo:font-weight="bold" officeooo:rsid="00223856" officeooo:paragraph-rsid="00223856"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fda67"/>
    </style:style>
    <style:style style:name="T3" style:family="text">
      <style:text-properties officeooo:rsid="00223856"/>
    </style:style>
    <style:style style:name="T4" style:family="text">
      <style:text-properties officeooo:rsid="001fda67"/>
    </style:style>
    <style:style style:name="T5" style:family="text">
      <style:text-properties fo:font-weight="bold" style:font-weight-asian="bold" style:font-weight-complex="bold"/>
    </style:style>
    <style:style style:name="T6" style:family="text">
      <style:text-properties officeooo:rsid="0023f13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Meteorological data (from remote sensing)</text:span><text:span text:style-name="T4">:</text:span></text:p>
      <text:p text:style-name="Standard">ERA5-Land is a global dataset that offers detailed information about land surface conditions, such as temperature and precipitation, across the globe. It's produced by the European Centre for Medium-Range Weather Forecasts (ECMWF) and serves as an extension of their ERA5 climate reanalysis project. While ERA5 integrates a vast array of observational data—including measurements from satellites, weather stations, and other sources—ERA5-Land enhances this by focusing specifically on land areas, providing data at a higher spatial resolution of approximately 9 km, compared to ERA5's 31 km <text:reference-mark-start text:name="ZOTERO_ITEM CSL_CITATION {&quot;citationID&quot;:&quot;1Ainj4O7&quot;,&quot;properties&quot;:{&quot;formattedCitation&quot;:&quot;[1,2]&quot;,&quot;plainCitation&quot;:&quot;[1,2]&quot;,&quot;noteIndex&quot;:0},&quot;citationItems&quot;:[{&quot;id&quot;:16664,&quot;uris&quot;:[&quot;http://zotero.org/users/5464174/items/4TEFQHU3&quot;],&quot;itemData&quot;:{&quot;id&quot;:16664,&quot;type&quot;:&quot;article-journal&quot;,&quot;abstract&quot;:&quot;Framed within the Copernicus Climate Change Service (C3S) of the European Commission, the European Centre for Medium-Range Weather Forecasts (ECMWF) is producing an enhanced global dataset for the land component of the fifth generation of European ReAnalysis (ERA5), hereafter referred to as ERA5-Land. Once completed, the period covered will span from 1950 to the present, with continuous updates to support land monitoring applications. ERA5-Land describes the evolution of the water and energy cycles over land in a consistent manner over the production period, which, among others, could be used to analyse trends and anomalies. This is achieved through global high-resolution numerical integrations of the ECMWF land surface model driven by the downscaled meteorological forcing from the ERA5 climate reanalysis, including an elevation correction for the thermodynamic near-surface state. ERA5-Land shares with ERA5 most of the parameterizations that guarantees the use of the state-of-the-art land surface modelling applied to numerical weather prediction (NWP) models. A main advantage of ERA5-Land compared to ERA5 and the older ERA-Interim is the horizontal resolution, which is enhanced globally to 9 km compared to 31 km (ERA5) or 80 km (ERA-Interim), whereas the temporal resolution is hourly as in ERA5. Evaluation against independent in situ observations and global model or satellite-based reference datasets shows the added value of ERA5-Land in the description of the hydrological cycle, in particular with enhanced soil moisture and lake description, and an overall better agreement of river discharge estimations with available observations. However, ERA5-Land snow depth fields present a mixed performance when compared to those of ERA5, depending on geographical location and altitude. The description of the energy cycle shows comparable results with ERA5. Nevertheless, ERA5-Land reduces the global averaged root mean square error of the skin temperature, taking as reference MODIS data, mainly due to the contribution of coastal points where spatial resolution is important. Since January 2020, the ERA5-Land period available has extended from January 1981 to the near present, with a 2- to 3-month delay with respect to real time. The segment prior to 1981 is in production, aiming for a release of the whole dataset in summer/autumn 2021. The high spatial and temporal resolution of ERA5-Land, its extended period, and the consistency of the fields produced makes it a valuable dataset to support hydrological studies, to initialize NWP and climate models, and to support diverse applications dealing with water resource, land, and environmental management.\n\n The full ERA5-Land hourly (Muñoz-Sabater, 2019a) and monthly (Muñoz-Sabater, 2019b) averaged datasets presented in this paper are available through the C3S Climate Data Store at https://doi.org/10.24381/cds.e2161bac and https://doi.org/10.24381/cds.68d2bb30, respectively.&quot;,&quot;container-title&quot;:&quot;Earth System Science Data&quot;,&quot;DOI&quot;:&quot;10.5194/essd-13-4349-2021&quot;,&quot;ISSN&quot;:&quot;1866-3508&quot;,&quot;issue&quot;:&quot;9&quot;,&quot;language&quot;:&quot;English&quot;,&quot;note&quot;:&quot;publisher: Copernicus GmbH&quot;,&quot;page&quot;:&quot;4349-4383&quot;,&quot;source&quot;:&quot;Copernicus Online Journals&quot;,&quot;title&quot;:&quot;ERA5-Land: a state-of-the-art global reanalysis dataset for land applications&quot;,&quot;title-short&quot;:&quot;ERA5-Land&quot;,&quot;volume&quot;:&quot;13&quot;,&quot;author&quot;:[{&quot;family&quot;:&quot;Muñoz-Sabater&quot;,&quot;given&quot;:&quot;Joaquín&quot;},{&quot;family&quot;:&quot;Dutra&quot;,&quot;given&quot;:&quot;Emanuel&quot;},{&quot;family&quot;:&quot;Agustí-Panareda&quot;,&quot;given&quot;:&quot;Anna&quot;},{&quot;family&quot;:&quot;Albergel&quot;,&quot;given&quot;:&quot;Clément&quot;},{&quot;family&quot;:&quot;Arduini&quot;,&quot;given&quot;:&quot;Gabriele&quot;},{&quot;family&quot;:&quot;Balsamo&quot;,&quot;given&quot;:&quot;Gianpaolo&quot;},{&quot;family&quot;:&quot;Boussetta&quot;,&quot;given&quot;:&quot;Souhail&quot;},{&quot;family&quot;:&quot;Choulga&quot;,&quot;given&quot;:&quot;Margarita&quot;},{&quot;family&quot;:&quot;Harrigan&quot;,&quot;given&quot;:&quot;Shaun&quot;},{&quot;family&quot;:&quot;Hersbach&quot;,&quot;given&quot;:&quot;Hans&quot;},{&quot;family&quot;:&quot;Martens&quot;,&quot;given&quot;:&quot;Brecht&quot;},{&quot;family&quot;:&quot;Miralles&quot;,&quot;given&quot;:&quot;Diego G.&quot;},{&quot;family&quot;:&quot;Piles&quot;,&quot;given&quot;:&quot;María&quot;},{&quot;family&quot;:&quot;Rodríguez-Fernández&quot;,&quot;given&quot;:&quot;Nemesio J.&quot;},{&quot;family&quot;:&quot;Zsoter&quot;,&quot;given&quot;:&quot;Ervin&quot;},{&quot;family&quot;:&quot;Buontempo&quot;,&quot;given&quot;:&quot;Carlo&quot;},{&quot;family&quot;:&quot;Thépaut&quot;,&quot;given&quot;:&quot;Jean-Noël&quot;}],&quot;issued&quot;:{&quot;date-parts&quot;:[[&quot;2021&quot;,9,7]]}}},{&quot;id&quot;:16666,&quot;uris&quot;:[&quot;http://zotero.org/users/5464174/items/I3UY6XTA&quot;],&quot;itemData&quot;:{&quot;id&quot;:16666,&quot;type&quot;:&quot;webpage&quot;,&quot;abstract&quot;:&quot;ERA5-Land is a reanalysis dataset providing a consistent view of the evolution of land variables over several decades at an enhanced resolution compared to ERA5. ERA5-Land has been produced by replaying the land component of the ECMWF ERA5 climate reanalysis. Reanalysis combines model data with observations from across the world into a globally complete and consistent dataset using the laws of physics. Reanalysis produces data that goes several decades back in time, providing an accurate description of the climate of the past. \nERA5-Land uses as input to control the simulated land fields ERA5 atmospheric variables, such as air temperature and air humidity. This is called the atmospheric forcing. Without the constraint of the atmospheric forcing, the model-based estimates can rapidly deviate from reality. Therefore, while observations are not directly used in the production of ERA5-Land, they have an indirect influence through the atmospheric forcing used to run the simulation. In addition, the input air temperature, air humidity and pressure used to run ERA5-Land are corrected to account for the altitude difference between the grid of the forcing and the higher resolution grid of ERA5-Land. This correction is called 'lapse rate correction'.    \nThe ERA5-Land dataset, as any other simulation, provides estimates which have some degree of uncertainty. Numerical models can only provide a more or less accurate representation of the real physical processes governing different components of the Earth System. In general, the uncertainty of model estimates grows as we go back in time, because the number of observations available to create a good quality atmospheric forcing is lower. ERA5-land parameter fields can currently be used in combination with the uncertainty of the equivalent ERA5 fields. \nThe temporal and spatial resolutions of ERA5-Land makes this dataset very useful for all kind of land surface applications such as flood or drought forecasting. The temporal and spatial resolution of this dataset, the period covered in time, as well as the fixed grid used for the data distribution at any period enables decisions makers, businesses and individuals to access and use more accurate information on land states.&quot;,&quot;language&quot;:&quot;en&quot;,&quot;title&quot;:&quot;ERA5-Land hourly data from 1950 to present&quot;,&quot;URL&quot;:&quot;https://cds.climate.copernicus.eu/datasets/reanalysis-era5-land?tab=overview&quot;,&quot;accessed&quot;:{&quot;date-parts&quot;:[[&quot;2025&quot;,3,29]]}}}],&quot;schema&quot;:&quot;https://github.com/citation-style-language/schema/raw/master/csl-citation.json&quot;} RNDM1HkEx45Zz"/>[1,2]<text:reference-mark-end text:name="ZOTERO_ITEM CSL_CITATION {&quot;citationID&quot;:&quot;1Ainj4O7&quot;,&quot;properties&quot;:{&quot;formattedCitation&quot;:&quot;[1,2]&quot;,&quot;plainCitation&quot;:&quot;[1,2]&quot;,&quot;noteIndex&quot;:0},&quot;citationItems&quot;:[{&quot;id&quot;:16664,&quot;uris&quot;:[&quot;http://zotero.org/users/5464174/items/4TEFQHU3&quot;],&quot;itemData&quot;:{&quot;id&quot;:16664,&quot;type&quot;:&quot;article-journal&quot;,&quot;abstract&quot;:&quot;Framed within the Copernicus Climate Change Service (C3S) of the European Commission, the European Centre for Medium-Range Weather Forecasts (ECMWF) is producing an enhanced global dataset for the land component of the fifth generation of European ReAnalysis (ERA5), hereafter referred to as ERA5-Land. Once completed, the period covered will span from 1950 to the present, with continuous updates to support land monitoring applications. ERA5-Land describes the evolution of the water and energy cycles over land in a consistent manner over the production period, which, among others, could be used to analyse trends and anomalies. This is achieved through global high-resolution numerical integrations of the ECMWF land surface model driven by the downscaled meteorological forcing from the ERA5 climate reanalysis, including an elevation correction for the thermodynamic near-surface state. ERA5-Land shares with ERA5 most of the parameterizations that guarantees the use of the state-of-the-art land surface modelling applied to numerical weather prediction (NWP) models. A main advantage of ERA5-Land compared to ERA5 and the older ERA-Interim is the horizontal resolution, which is enhanced globally to 9 km compared to 31 km (ERA5) or 80 km (ERA-Interim), whereas the temporal resolution is hourly as in ERA5. Evaluation against independent in situ observations and global model or satellite-based reference datasets shows the added value of ERA5-Land in the description of the hydrological cycle, in particular with enhanced soil moisture and lake description, and an overall better agreement of river discharge estimations with available observations. However, ERA5-Land snow depth fields present a mixed performance when compared to those of ERA5, depending on geographical location and altitude. The description of the energy cycle shows comparable results with ERA5. Nevertheless, ERA5-Land reduces the global averaged root mean square error of the skin temperature, taking as reference MODIS data, mainly due to the contribution of coastal points where spatial resolution is important. Since January 2020, the ERA5-Land period available has extended from January 1981 to the near present, with a 2- to 3-month delay with respect to real time. The segment prior to 1981 is in production, aiming for a release of the whole dataset in summer/autumn 2021. The high spatial and temporal resolution of ERA5-Land, its extended period, and the consistency of the fields produced makes it a valuable dataset to support hydrological studies, to initialize NWP and climate models, and to support diverse applications dealing with water resource, land, and environmental management.\n\n The full ERA5-Land hourly (Muñoz-Sabater, 2019a) and monthly (Muñoz-Sabater, 2019b) averaged datasets presented in this paper are available through the C3S Climate Data Store at https://doi.org/10.24381/cds.e2161bac and https://doi.org/10.24381/cds.68d2bb30, respectively.&quot;,&quot;container-title&quot;:&quot;Earth System Science Data&quot;,&quot;DOI&quot;:&quot;10.5194/essd-13-4349-2021&quot;,&quot;ISSN&quot;:&quot;1866-3508&quot;,&quot;issue&quot;:&quot;9&quot;,&quot;language&quot;:&quot;English&quot;,&quot;note&quot;:&quot;publisher: Copernicus GmbH&quot;,&quot;page&quot;:&quot;4349-4383&quot;,&quot;source&quot;:&quot;Copernicus Online Journals&quot;,&quot;title&quot;:&quot;ERA5-Land: a state-of-the-art global reanalysis dataset for land applications&quot;,&quot;title-short&quot;:&quot;ERA5-Land&quot;,&quot;volume&quot;:&quot;13&quot;,&quot;author&quot;:[{&quot;family&quot;:&quot;Muñoz-Sabater&quot;,&quot;given&quot;:&quot;Joaquín&quot;},{&quot;family&quot;:&quot;Dutra&quot;,&quot;given&quot;:&quot;Emanuel&quot;},{&quot;family&quot;:&quot;Agustí-Panareda&quot;,&quot;given&quot;:&quot;Anna&quot;},{&quot;family&quot;:&quot;Albergel&quot;,&quot;given&quot;:&quot;Clément&quot;},{&quot;family&quot;:&quot;Arduini&quot;,&quot;given&quot;:&quot;Gabriele&quot;},{&quot;family&quot;:&quot;Balsamo&quot;,&quot;given&quot;:&quot;Gianpaolo&quot;},{&quot;family&quot;:&quot;Boussetta&quot;,&quot;given&quot;:&quot;Souhail&quot;},{&quot;family&quot;:&quot;Choulga&quot;,&quot;given&quot;:&quot;Margarita&quot;},{&quot;family&quot;:&quot;Harrigan&quot;,&quot;given&quot;:&quot;Shaun&quot;},{&quot;family&quot;:&quot;Hersbach&quot;,&quot;given&quot;:&quot;Hans&quot;},{&quot;family&quot;:&quot;Martens&quot;,&quot;given&quot;:&quot;Brecht&quot;},{&quot;family&quot;:&quot;Miralles&quot;,&quot;given&quot;:&quot;Diego G.&quot;},{&quot;family&quot;:&quot;Piles&quot;,&quot;given&quot;:&quot;María&quot;},{&quot;family&quot;:&quot;Rodríguez-Fernández&quot;,&quot;given&quot;:&quot;Nemesio J.&quot;},{&quot;family&quot;:&quot;Zsoter&quot;,&quot;given&quot;:&quot;Ervin&quot;},{&quot;family&quot;:&quot;Buontempo&quot;,&quot;given&quot;:&quot;Carlo&quot;},{&quot;family&quot;:&quot;Thépaut&quot;,&quot;given&quot;:&quot;Jean-Noël&quot;}],&quot;issued&quot;:{&quot;date-parts&quot;:[[&quot;2021&quot;,9,7]]}}},{&quot;id&quot;:16666,&quot;uris&quot;:[&quot;http://zotero.org/users/5464174/items/I3UY6XTA&quot;],&quot;itemData&quot;:{&quot;id&quot;:16666,&quot;type&quot;:&quot;webpage&quot;,&quot;abstract&quot;:&quot;ERA5-Land is a reanalysis dataset providing a consistent view of the evolution of land variables over several decades at an enhanced resolution compared to ERA5. ERA5-Land has been produced by replaying the land component of the ECMWF ERA5 climate reanalysis. Reanalysis combines model data with observations from across the world into a globally complete and consistent dataset using the laws of physics. Reanalysis produces data that goes several decades back in time, providing an accurate description of the climate of the past. \nERA5-Land uses as input to control the simulated land fields ERA5 atmospheric variables, such as air temperature and air humidity. This is called the atmospheric forcing. Without the constraint of the atmospheric forcing, the model-based estimates can rapidly deviate from reality. Therefore, while observations are not directly used in the production of ERA5-Land, they have an indirect influence through the atmospheric forcing used to run the simulation. In addition, the input air temperature, air humidity and pressure used to run ERA5-Land are corrected to account for the altitude difference between the grid of the forcing and the higher resolution grid of ERA5-Land. This correction is called 'lapse rate correction'.    \nThe ERA5-Land dataset, as any other simulation, provides estimates which have some degree of uncertainty. Numerical models can only provide a more or less accurate representation of the real physical processes governing different components of the Earth System. In general, the uncertainty of model estimates grows as we go back in time, because the number of observations available to create a good quality atmospheric forcing is lower. ERA5-land parameter fields can currently be used in combination with the uncertainty of the equivalent ERA5 fields. \nThe temporal and spatial resolutions of ERA5-Land makes this dataset very useful for all kind of land surface applications such as flood or drought forecasting. The temporal and spatial resolution of this dataset, the period covered in time, as well as the fixed grid used for the data distribution at any period enables decisions makers, businesses and individuals to access and use more accurate information on land states.&quot;,&quot;language&quot;:&quot;en&quot;,&quot;title&quot;:&quot;ERA5-Land hourly data from 1950 to present&quot;,&quot;URL&quot;:&quot;https://cds.climate.copernicus.eu/datasets/reanalysis-era5-land?tab=overview&quot;,&quot;accessed&quot;:{&quot;date-parts&quot;:[[&quot;2025&quot;,3,29]]}}}],&quot;schema&quot;:&quot;https://github.com/citation-style-language/schema/raw/master/csl-citation.json&quot;} RNDM1HkEx45Zz"/>. <text:s/></text:p>
      <text:p text:style-name="Standard"/>
      <text:p text:style-name="Standard">The creation of ERA5-Land involves running ECMWF's land surface model, known as HTESSEL, which simulates various land processes. This model is driven by atmospheric data from ERA5, meaning that while ERA5-Land doesn't directly assimilate observational data, it inherits the observational influences present in ERA5. This setup ensures that ERA5-Land benefits from real-world measurements, albeit indirectly, through its reliance on ERA5's assimilated atmospheric conditions . </text:p>
      <text:p text:style-name="Standard"/>
      <text:p text:style-name="Standard">In summary, ERA5-Land provides a consistent and detailed representation of land surface variables by leveraging the observationally enriched atmospheric data from ERA5. This approach allows users to analyze and monitor land surface conditions with greater precision and over extended periods, making it a valuable resource for climate research and environmental monitoring. </text:p>
      <text:p text:style-name="Standard"/>
      <text:p text:style-name="Standard"/>
      <text:p text:style-name="P6"><text:span text:style-name="T2">Land surface temperature</text:span></text:p>
      <text:p text:style-name="Standard">MODIS Land Surface Temperature (LST) is derived from the MODIS instruments aboard NASA’s Terra and Aqua satellites using a split-window algorithm that analyzes thermal infrared bands (specifically bands 31 and 32 at 11–12 µm). This method accounts for atmospheric water vapor and surface emissivity to estimate the temperature of the Earth’s surface—also known as “skin temperature.” Emissivity is estimated using NDVI-based approaches, and the data is corrected for clouds and atmospheric effects. The final product is typically an 8-day composite at 1 km spatial resolution, with temperatures stored in Kelvin and scaled by a factor of 0.02 <text:reference-mark-start text:name="ZOTERO_ITEM CSL_CITATION {&quot;citationID&quot;:&quot;n1Wocmep&quot;,&quot;properties&quot;:{&quot;formattedCitation&quot;:&quot;[3]&quot;,&quot;plainCitation&quot;:&quot;[3]&quot;,&quot;noteIndex&quot;:0},&quot;citationItems&quot;:[{&quot;id&quot;:16668,&quot;uris&quot;:[&quot;http://zotero.org/users/5464174/items/KHWRGB9P&quot;],&quot;itemData&quot;:{&quot;id&quot;:16668,&quot;type&quot;:&quot;dataset&quot;,&quot;DOI&quot;:&quot;10.5067/MODIS/MOD11A2.006&quot;,&quot;publisher&quot;:&quot;NASA EOSDIS Land Processes Distributed Active Archive Center&quot;,&quot;source&quot;:&quot;DOI.org (Datacite)&quot;,&quot;title&quot;:&quot;MOD11A2 MODIS/Terra Land Surface Temperature/Emissivity 8-Day L3 Global 1km SIN Grid V006&quot;,&quot;URL&quot;:&quot;https://lpdaac.usgs.gov/products/mod11a2v006/&quot;,&quot;author&quot;:[{&quot;family&quot;:&quot;Wan&quot;,&quot;given&quot;:&quot;Zhengming&quot;},{&quot;family&quot;:&quot;Hook&quot;,&quot;given&quot;:&quot;Simon&quot;},{&quot;family&quot;:&quot;Hulley&quot;,&quot;given&quot;:&quot;Glynn&quot;}],&quot;accessed&quot;:{&quot;date-parts&quot;:[[&quot;2025&quot;,3,29]]},&quot;issued&quot;:{&quot;date-parts&quot;:[[&quot;2015&quot;]]}}}],&quot;schema&quot;:&quot;https://github.com/citation-style-language/schema/raw/master/csl-citation.json&quot;} RNDw8zGqPab72"/>[3]<text:reference-mark-end text:name="ZOTERO_ITEM CSL_CITATION {&quot;citationID&quot;:&quot;n1Wocmep&quot;,&quot;properties&quot;:{&quot;formattedCitation&quot;:&quot;[3]&quot;,&quot;plainCitation&quot;:&quot;[3]&quot;,&quot;noteIndex&quot;:0},&quot;citationItems&quot;:[{&quot;id&quot;:16668,&quot;uris&quot;:[&quot;http://zotero.org/users/5464174/items/KHWRGB9P&quot;],&quot;itemData&quot;:{&quot;id&quot;:16668,&quot;type&quot;:&quot;dataset&quot;,&quot;DOI&quot;:&quot;10.5067/MODIS/MOD11A2.006&quot;,&quot;publisher&quot;:&quot;NASA EOSDIS Land Processes Distributed Active Archive Center&quot;,&quot;source&quot;:&quot;DOI.org (Datacite)&quot;,&quot;title&quot;:&quot;MOD11A2 MODIS/Terra Land Surface Temperature/Emissivity 8-Day L3 Global 1km SIN Grid V006&quot;,&quot;URL&quot;:&quot;https://lpdaac.usgs.gov/products/mod11a2v006/&quot;,&quot;author&quot;:[{&quot;family&quot;:&quot;Wan&quot;,&quot;given&quot;:&quot;Zhengming&quot;},{&quot;family&quot;:&quot;Hook&quot;,&quot;given&quot;:&quot;Simon&quot;},{&quot;family&quot;:&quot;Hulley&quot;,&quot;given&quot;:&quot;Glynn&quot;}],&quot;accessed&quot;:{&quot;date-parts&quot;:[[&quot;2025&quot;,3,29]]},&quot;issued&quot;:{&quot;date-parts&quot;:[[&quot;2015&quot;]]}}}],&quot;schema&quot;:&quot;https://github.com/citation-style-language/schema/raw/master/csl-citation.json&quot;} RNDw8zGqPab72"/>.</text:p>
      <text:p text:style-name="Standard"/>
      <text:p text:style-name="Standard">Landsat Land Surface Temperature (LST) is calculated from the Thermal Infrared Sensor (TIRS) aboard Landsat 8, specifically using Band 10. A single-channel algorithm is applied, which corrects for atmospheric effects and surface emissivity using data from auxiliary sources such as the ASTER Global Emissivity Database. Brightness temperature is computed from thermal radiance and adjusted using the radiative transfer equation. The resulting LST values represent surface (skin) temperature and are output as scaled Kelvin values, typically converted to degrees Celsius for interpretation. Landsat LST has a 100-meter resolution and is provided as part of the Level 2 Science Products in Collection 2 <text:reference-mark-start text:name="ZOTERO_ITEM CSL_CITATION {&quot;citationID&quot;:&quot;ETmzJhVS&quot;,&quot;properties&quot;:{&quot;formattedCitation&quot;:&quot;[4]&quot;,&quot;plainCitation&quot;:&quot;[4]&quot;,&quot;noteIndex&quot;:0},&quot;citationItems&quot;:[{&quot;id&quot;:16669,&quot;uris&quot;:[&quot;http://zotero.org/users/5464174/items/WYIQ32M9&quot;],&quot;itemData&quot;:{&quot;id&quot;:16669,&quot;type&quot;:&quot;article-journal&quot;,&quot;abstract&quot;:&quot;The Landsat program has been producing an archive of thermal imagery that spans the globe and covers 30 years of the thermal history of the planet at human scales  (60–120 m). Most of that archive’s absolute radiometric calibration has been fixed through vicarious calibration techniques. These calibration ties to trusted values have often taken a year or more to gather sufficient data and, in some cases, it has been over a decade before calibration certainty has been established. With temperature being such a critical factor for all living systems and the ongoing concern over the impacts of climate change, NASA and the United States Geological Survey (USGS) are leading efforts to provide timely and accurate temperature data from the Landsat thermal data archive. This paper discusses two closely related advances that are critical steps toward providing timely and reliable temperature image maps from Landsat. The first advance involves the development and testing of an autonomous procedure for gathering and performing initial screening of large amounts of vicarious calibration data. The second advance discussed in this paper is the  per-pixel atmospheric compensation of the data to permit calculation of the emitted surface radiance (using ancillary sources of emissivity data) and the corresponding land surface temperature (LST).&quot;,&quot;container-title&quot;:&quot;Remote Sensing&quot;,&quot;DOI&quot;:&quot;10.3390/rs61111244&quot;,&quot;ISSN&quot;:&quot;2072-4292&quot;,&quot;issue&quot;:&quot;11&quot;,&quot;language&quot;:&quot;en&quot;,&quot;license&quot;:&quot;http://creativecommons.org/licenses/by/3.0/&quot;,&quot;note&quot;:&quot;number: 11\npublisher: Multidisciplinary Digital Publishing Institute&quot;,&quot;page&quot;:&quot;11244-11266&quot;,&quot;source&quot;:&quot;www.mdpi.com&quot;,&quot;title&quot;:&quot;Development of an Operational Calibration Methodology for the Landsat Thermal Data Archive and Initial Testing of the Atmospheric Compensation Component of a Land Surface Temperature (LST) Product from the Archive&quot;,&quot;volume&quot;:&quot;6&quot;,&quot;author&quot;:[{&quot;family&quot;:&quot;Cook&quot;,&quot;given&quot;:&quot;Monica&quot;},{&quot;family&quot;:&quot;Schott&quot;,&quot;given&quot;:&quot;John R.&quot;},{&quot;family&quot;:&quot;Mandel&quot;,&quot;given&quot;:&quot;John&quot;},{&quot;family&quot;:&quot;Raqueno&quot;,&quot;given&quot;:&quot;Nina&quot;}],&quot;issued&quot;:{&quot;date-parts&quot;:[[&quot;2014&quot;,11]]}}}],&quot;schema&quot;:&quot;https://github.com/citation-style-language/schema/raw/master/csl-citation.json&quot;} RNDrMN3Q6AuJe"/>[4]<text:reference-mark-end text:name="ZOTERO_ITEM CSL_CITATION {&quot;citationID&quot;:&quot;ETmzJhVS&quot;,&quot;properties&quot;:{&quot;formattedCitation&quot;:&quot;[4]&quot;,&quot;plainCitation&quot;:&quot;[4]&quot;,&quot;noteIndex&quot;:0},&quot;citationItems&quot;:[{&quot;id&quot;:16669,&quot;uris&quot;:[&quot;http://zotero.org/users/5464174/items/WYIQ32M9&quot;],&quot;itemData&quot;:{&quot;id&quot;:16669,&quot;type&quot;:&quot;article-journal&quot;,&quot;abstract&quot;:&quot;The Landsat program has been producing an archive of thermal imagery that spans the globe and covers 30 years of the thermal history of the planet at human scales  (60–120 m). Most of that archive’s absolute radiometric calibration has been fixed through vicarious calibration techniques. These calibration ties to trusted values have often taken a year or more to gather sufficient data and, in some cases, it has been over a decade before calibration certainty has been established. With temperature being such a critical factor for all living systems and the ongoing concern over the impacts of climate change, NASA and the United States Geological Survey (USGS) are leading efforts to provide timely and accurate temperature data from the Landsat thermal data archive. This paper discusses two closely related advances that are critical steps toward providing timely and reliable temperature image maps from Landsat. The first advance involves the development and testing of an autonomous procedure for gathering and performing initial screening of large amounts of vicarious calibration data. The second advance discussed in this paper is the  per-pixel atmospheric compensation of the data to permit calculation of the emitted surface radiance (using ancillary sources of emissivity data) and the corresponding land surface temperature (LST).&quot;,&quot;container-title&quot;:&quot;Remote Sensing&quot;,&quot;DOI&quot;:&quot;10.3390/rs61111244&quot;,&quot;ISSN&quot;:&quot;2072-4292&quot;,&quot;issue&quot;:&quot;11&quot;,&quot;language&quot;:&quot;en&quot;,&quot;license&quot;:&quot;http://creativecommons.org/licenses/by/3.0/&quot;,&quot;note&quot;:&quot;number: 11\npublisher: Multidisciplinary Digital Publishing Institute&quot;,&quot;page&quot;:&quot;11244-11266&quot;,&quot;source&quot;:&quot;www.mdpi.com&quot;,&quot;title&quot;:&quot;Development of an Operational Calibration Methodology for the Landsat Thermal Data Archive and Initial Testing of the Atmospheric Compensation Component of a Land Surface Temperature (LST) Product from the Archive&quot;,&quot;volume&quot;:&quot;6&quot;,&quot;author&quot;:[{&quot;family&quot;:&quot;Cook&quot;,&quot;given&quot;:&quot;Monica&quot;},{&quot;family&quot;:&quot;Schott&quot;,&quot;given&quot;:&quot;John R.&quot;},{&quot;family&quot;:&quot;Mandel&quot;,&quot;given&quot;:&quot;John&quot;},{&quot;family&quot;:&quot;Raqueno&quot;,&quot;given&quot;:&quot;Nina&quot;}],&quot;issued&quot;:{&quot;date-parts&quot;:[[&quot;2014&quot;,11]]}}}],&quot;schema&quot;:&quot;https://github.com/citation-style-language/schema/raw/master/csl-citation.json&quot;} RNDrMN3Q6AuJe"/>.</text:p>
      <text:p text:style-name="Standard"/>
      <text:p text:style-name="Standard"/>
      <text:p text:style-name="P7"><text:span text:style-name="T1">Vegetation indices</text:span></text:p>
      <text:p text:style-name="Standard"><text:span text:style-name="T4">Vegetation indices derived from satellite imagery are widely used to monitor plant health, land cover change, and ecological dynamics. The Normalized Difference Vegetation Index (NDVI) is one of the most established tools for estimating vegetation density and greenness </text:span><text:reference-mark-start text:name="ZOTERO_ITEM CSL_CITATION {&quot;citationID&quot;:&quot;oZXTMihO&quot;,&quot;properties&quot;:{&quot;formattedCitation&quot;:&quot;[5]&quot;,&quot;plainCitation&quot;:&quot;[5]&quot;,&quot;noteIndex&quot;:0},&quot;citationItems&quot;:[{&quot;id&quot;:371,&quot;uris&quot;:[&quot;http://zotero.org/users/5464174/items/7DXZITL5&quot;],&quot;itemData&quot;:{&quot;id&quot;:371,&quot;type&quot;:&quot;report&quot;,&quot;number&quot;:&quot;E74-10676, NASA-CR-139243, PR-7&quot;,&quot;page&quot;:&quot;8&quot;,&quot;title&quot;:&quot;Monitoring the vernal advancement and retrogradation (Green wave effect) of natural vegetation&quot;,&quot;URL&quot;:&quot;https://ntrs.nasa.gov/archive/nasa/casi.ntrs.nasa.gov/19740022555.pdf&quot;,&quot;author&quot;:[{&quot;family&quot;:&quot;Rouse&quot;,&quot;given&quot;:&quot;JW&quot;},{&quot;family&quot;:&quot;Hass&quot;,&quot;given&quot;:&quot;RH&quot;},{&quot;family&quot;:&quot;Deering&quot;,&quot;given&quot;:&quot;DW&quot;},{&quot;family&quot;:&quot;Sehell&quot;,&quot;given&quot;:&quot;JA&quot;}],&quot;accessed&quot;:{&quot;date-parts&quot;:[[&quot;2019&quot;,7,29]]},&quot;issued&quot;:{&quot;date-parts&quot;:[[&quot;1974&quot;]]}}}],&quot;schema&quot;:&quot;https://github.com/citation-style-language/schema/raw/master/csl-citation.json&quot;} RNDCRfdzPZOiD"/><text:span text:style-name="T4">[5]</text:span><text:reference-mark-end text:name="ZOTERO_ITEM CSL_CITATION {&quot;citationID&quot;:&quot;oZXTMihO&quot;,&quot;properties&quot;:{&quot;formattedCitation&quot;:&quot;[5]&quot;,&quot;plainCitation&quot;:&quot;[5]&quot;,&quot;noteIndex&quot;:0},&quot;citationItems&quot;:[{&quot;id&quot;:371,&quot;uris&quot;:[&quot;http://zotero.org/users/5464174/items/7DXZITL5&quot;],&quot;itemData&quot;:{&quot;id&quot;:371,&quot;type&quot;:&quot;report&quot;,&quot;number&quot;:&quot;E74-10676, NASA-CR-139243, PR-7&quot;,&quot;page&quot;:&quot;8&quot;,&quot;title&quot;:&quot;Monitoring the vernal advancement and retrogradation (Green wave effect) of natural vegetation&quot;,&quot;URL&quot;:&quot;https://ntrs.nasa.gov/archive/nasa/casi.ntrs.nasa.gov/19740022555.pdf&quot;,&quot;author&quot;:[{&quot;family&quot;:&quot;Rouse&quot;,&quot;given&quot;:&quot;JW&quot;},{&quot;family&quot;:&quot;Hass&quot;,&quot;given&quot;:&quot;RH&quot;},{&quot;family&quot;:&quot;Deering&quot;,&quot;given&quot;:&quot;DW&quot;},{&quot;family&quot;:&quot;Sehell&quot;,&quot;given&quot;:&quot;JA&quot;}],&quot;accessed&quot;:{&quot;date-parts&quot;:[[&quot;2019&quot;,7,29]]},&quot;issued&quot;:{&quot;date-parts&quot;:[[&quot;1974&quot;]]}}}],&quot;schema&quot;:&quot;https://github.com/citation-style-language/schema/raw/master/csl-citation.json&quot;} RNDCRfdzPZOiD"/><text:span text:style-name="T4">. It leverages the fact that healthy vegetation absorbs most visible light—particularly in the red and blue bands—while reflecting a significant portion of near-infrared (NIR) radiation. The NDVI is calculated as:</text:span></text:p>
      <text:p text:style-name="P1"/>
      <text:p text:style-name="P1">NDVI = (NIR - Red) / (NIR + Red)</text:p>
      <text:p text:style-name="P1"/>
      <text:p text:style-name="Standard"><text:soft-page-break/><text:span text:style-name="T4">While NDVI is useful across a range of ecosystems, it has known limitations. It can saturate in areas with dense vegetation and is sensitive to atmospheric effects such as aerosols and variable solar illumination </text:span><text:reference-mark-start text:name="ZOTERO_ITEM CSL_CITATION {&quot;citationID&quot;:&quot;ZDO7Vl9C&quot;,&quot;properties&quot;:{&quot;formattedCitation&quot;:&quot;[6]&quot;,&quot;plainCitation&quot;:&quot;[6]&quot;,&quot;noteIndex&quot;:0},&quot;citationItems&quot;:[{&quot;id&quot;:347,&quot;uris&quot;:[&quot;http://zotero.org/users/5464174/items/D9RS9HLA&quot;],&quot;itemData&quot;:{&quot;id&quot;:347,&quot;type&quot;:&quot;article-journal&quot;,&quot;abstract&quot;:&quot;A transformation technique is presented to minimize soil brightness influences from spectral vegetation indices involving red and near-infrared (NIR) wavelengths. Graphically, the transformation involves a shifting of the origin of reflectance spectra plotted in NIR-red wavelength space to account for first-order soil-vegetation interactions and differential red and NIR flux extinction through vegetated canopies. For cotton (Gossypium hirsutum L. var DPI-70) and range grass (Eragrosticslehmanniana Nees) canopies, underlain with different soil backgrounds, the transformation nearly eliminated soil-induced variations in vegetation indices. A physical basis for the soil-adjusted vegetation index (SAVI) is subsequently presented. The SAVI was found to be an important step toward the establishment of simple °lobal” that can describe dynamic soil-vegetation systems from remotely sensed data.&quot;,&quot;container-title&quot;:&quot;Remote Sensing of Environment&quot;,&quot;DOI&quot;:&quot;10.1016/0034-4257(88)90106-X&quot;,&quot;ISSN&quot;:&quot;0034-4257&quot;,&quot;issue&quot;:&quot;3&quot;,&quot;journalAbbreviation&quot;:&quot;Remote Sensing of Environment&quot;,&quot;page&quot;:&quot;295-309&quot;,&quot;source&quot;:&quot;ScienceDirect&quot;,&quot;title&quot;:&quot;A soil-adjusted vegetation index (SAVI)&quot;,&quot;volume&quot;:&quot;25&quot;,&quot;author&quot;:[{&quot;family&quot;:&quot;Huete&quot;,&quot;given&quot;:&quot;A. R&quot;}],&quot;issued&quot;:{&quot;date-parts&quot;:[[&quot;1988&quot;,8,1]]}}}],&quot;schema&quot;:&quot;https://github.com/citation-style-language/schema/raw/master/csl-citation.json&quot;} RND5iufekvokj"/><text:span text:style-name="T4">[6]</text:span><text:reference-mark-end text:name="ZOTERO_ITEM CSL_CITATION {&quot;citationID&quot;:&quot;ZDO7Vl9C&quot;,&quot;properties&quot;:{&quot;formattedCitation&quot;:&quot;[6]&quot;,&quot;plainCitation&quot;:&quot;[6]&quot;,&quot;noteIndex&quot;:0},&quot;citationItems&quot;:[{&quot;id&quot;:347,&quot;uris&quot;:[&quot;http://zotero.org/users/5464174/items/D9RS9HLA&quot;],&quot;itemData&quot;:{&quot;id&quot;:347,&quot;type&quot;:&quot;article-journal&quot;,&quot;abstract&quot;:&quot;A transformation technique is presented to minimize soil brightness influences from spectral vegetation indices involving red and near-infrared (NIR) wavelengths. Graphically, the transformation involves a shifting of the origin of reflectance spectra plotted in NIR-red wavelength space to account for first-order soil-vegetation interactions and differential red and NIR flux extinction through vegetated canopies. For cotton (Gossypium hirsutum L. var DPI-70) and range grass (Eragrosticslehmanniana Nees) canopies, underlain with different soil backgrounds, the transformation nearly eliminated soil-induced variations in vegetation indices. A physical basis for the soil-adjusted vegetation index (SAVI) is subsequently presented. The SAVI was found to be an important step toward the establishment of simple °lobal” that can describe dynamic soil-vegetation systems from remotely sensed data.&quot;,&quot;container-title&quot;:&quot;Remote Sensing of Environment&quot;,&quot;DOI&quot;:&quot;10.1016/0034-4257(88)90106-X&quot;,&quot;ISSN&quot;:&quot;0034-4257&quot;,&quot;issue&quot;:&quot;3&quot;,&quot;journalAbbreviation&quot;:&quot;Remote Sensing of Environment&quot;,&quot;page&quot;:&quot;295-309&quot;,&quot;source&quot;:&quot;ScienceDirect&quot;,&quot;title&quot;:&quot;A soil-adjusted vegetation index (SAVI)&quot;,&quot;volume&quot;:&quot;25&quot;,&quot;author&quot;:[{&quot;family&quot;:&quot;Huete&quot;,&quot;given&quot;:&quot;A. R&quot;}],&quot;issued&quot;:{&quot;date-parts&quot;:[[&quot;1988&quot;,8,1]]}}}],&quot;schema&quot;:&quot;https://github.com/citation-style-language/schema/raw/master/csl-citation.json&quot;} RND5iufekvokj"/><text:span text:style-name="T4">.</text:span></text:p>
      <text:p text:style-name="P1"/>
      <text:p text:style-name="Standard"><text:span text:style-name="T4">To address these shortcomings, the Enhanced Vegetation Index (EVI) was developed </text:span><text:reference-mark-start text:name="ZOTERO_ITEM CSL_CITATION {&quot;citationID&quot;:&quot;EcBZwRUZ&quot;,&quot;properties&quot;:{&quot;formattedCitation&quot;:&quot;[7]&quot;,&quot;plainCitation&quot;:&quot;[7]&quot;,&quot;noteIndex&quot;:0},&quot;citationItems&quot;:[{&quot;id&quot;:348,&quot;uris&quot;:[&quot;http://zotero.org/users/5464174/items/UBR5486E&quot;],&quot;itemData&quot;:{&quot;id&quot;:348,&quot;type&quot;:&quot;article-journal&quot;,&quot;abstract&quot;:&quot;We evaluated the initial 12 months of vegetation index product availability from the Moderate Resolution Imaging Spectroradiometer (MODIS) on board the Earth Observing System-Terra platform. Two MODIS vegetation indices (VI), the normalized difference vegetation index (NDVI) and enhanced vegetation index (EVI), are produced at 1-km and 500-m resolutions and 16-day compositing periods. This paper presents an initial analysis of the MODIS NDVI and EVI performance from both radiometric and biophysical perspectives. We utilize a combination of site-intensive and regionally extensive approaches to demonstrate the performance and validity of the two indices. Our results showed a good correspondence between airborne-measured, top-of-canopy reflectances and VI values with those from the MODIS sensor at four intensively measured test sites representing semi-arid grass/shrub, savanna, and tropical forest biomes. Simultaneously derived field biophysical measures also demonstrated the scientific utility of the MODIS VI. Multitemporal profiles of the MODIS VIs over numerous biome types in North and South America well represented their seasonal phenologies. Comparisons of the MODIS-NDVI with the NOAA-14, 1-km AVHRR-NDVI temporal profiles showed that the MODIS-based index performed with higher fidelity. The dynamic range of the MODIS VIs are presented and their sensitivities in discriminating vegetation differences are evaluated in sparse and dense vegetation areas. We found the NDVI to asymptotically saturate in high biomass regions such as in the Amazon while the EVI remained sensitive to canopy variations.&quot;,&quot;collection-title&quot;:&quot;The Moderate Resolution Imaging Spectroradiometer (MODIS): a new generation of Land Surface Monitoring&quot;,&quot;container-title&quot;:&quot;Remote Sensing of Environment&quot;,&quot;DOI&quot;:&quot;10.1016/S0034-4257(02)00096-2&quot;,&quot;ISSN&quot;:&quot;0034-4257&quot;,&quot;issue&quot;:&quot;1&quot;,&quot;journalAbbreviation&quot;:&quot;Remote Sensing of Environment&quot;,&quot;page&quot;:&quot;195-213&quot;,&quot;source&quot;:&quot;ScienceDirect&quot;,&quot;title&quot;:&quot;Overview of the radiometric and biophysical performance of the MODIS vegetation indices&quot;,&quot;volume&quot;:&quot;83&quot;,&quot;author&quot;:[{&quot;family&quot;:&quot;Huete&quot;,&quot;given&quot;:&quot;A&quot;},{&quot;family&quot;:&quot;Didan&quot;,&quot;given&quot;:&quot;K&quot;},{&quot;family&quot;:&quot;Miura&quot;,&quot;given&quot;:&quot;T&quot;},{&quot;family&quot;:&quot;Rodriguez&quot;,&quot;given&quot;:&quot;E. P&quot;},{&quot;family&quot;:&quot;Gao&quot;,&quot;given&quot;:&quot;X&quot;},{&quot;family&quot;:&quot;Ferreira&quot;,&quot;given&quot;:&quot;L. G&quot;}],&quot;issued&quot;:{&quot;date-parts&quot;:[[&quot;2002&quot;,11,1]]}}}],&quot;schema&quot;:&quot;https://github.com/citation-style-language/schema/raw/master/csl-citation.json&quot;} RND5IGz68SnoM"/><text:span text:style-name="T4">[7]</text:span><text:reference-mark-end text:name="ZOTERO_ITEM CSL_CITATION {&quot;citationID&quot;:&quot;EcBZwRUZ&quot;,&quot;properties&quot;:{&quot;formattedCitation&quot;:&quot;[7]&quot;,&quot;plainCitation&quot;:&quot;[7]&quot;,&quot;noteIndex&quot;:0},&quot;citationItems&quot;:[{&quot;id&quot;:348,&quot;uris&quot;:[&quot;http://zotero.org/users/5464174/items/UBR5486E&quot;],&quot;itemData&quot;:{&quot;id&quot;:348,&quot;type&quot;:&quot;article-journal&quot;,&quot;abstract&quot;:&quot;We evaluated the initial 12 months of vegetation index product availability from the Moderate Resolution Imaging Spectroradiometer (MODIS) on board the Earth Observing System-Terra platform. Two MODIS vegetation indices (VI), the normalized difference vegetation index (NDVI) and enhanced vegetation index (EVI), are produced at 1-km and 500-m resolutions and 16-day compositing periods. This paper presents an initial analysis of the MODIS NDVI and EVI performance from both radiometric and biophysical perspectives. We utilize a combination of site-intensive and regionally extensive approaches to demonstrate the performance and validity of the two indices. Our results showed a good correspondence between airborne-measured, top-of-canopy reflectances and VI values with those from the MODIS sensor at four intensively measured test sites representing semi-arid grass/shrub, savanna, and tropical forest biomes. Simultaneously derived field biophysical measures also demonstrated the scientific utility of the MODIS VI. Multitemporal profiles of the MODIS VIs over numerous biome types in North and South America well represented their seasonal phenologies. Comparisons of the MODIS-NDVI with the NOAA-14, 1-km AVHRR-NDVI temporal profiles showed that the MODIS-based index performed with higher fidelity. The dynamic range of the MODIS VIs are presented and their sensitivities in discriminating vegetation differences are evaluated in sparse and dense vegetation areas. We found the NDVI to asymptotically saturate in high biomass regions such as in the Amazon while the EVI remained sensitive to canopy variations.&quot;,&quot;collection-title&quot;:&quot;The Moderate Resolution Imaging Spectroradiometer (MODIS): a new generation of Land Surface Monitoring&quot;,&quot;container-title&quot;:&quot;Remote Sensing of Environment&quot;,&quot;DOI&quot;:&quot;10.1016/S0034-4257(02)00096-2&quot;,&quot;ISSN&quot;:&quot;0034-4257&quot;,&quot;issue&quot;:&quot;1&quot;,&quot;journalAbbreviation&quot;:&quot;Remote Sensing of Environment&quot;,&quot;page&quot;:&quot;195-213&quot;,&quot;source&quot;:&quot;ScienceDirect&quot;,&quot;title&quot;:&quot;Overview of the radiometric and biophysical performance of the MODIS vegetation indices&quot;,&quot;volume&quot;:&quot;83&quot;,&quot;author&quot;:[{&quot;family&quot;:&quot;Huete&quot;,&quot;given&quot;:&quot;A&quot;},{&quot;family&quot;:&quot;Didan&quot;,&quot;given&quot;:&quot;K&quot;},{&quot;family&quot;:&quot;Miura&quot;,&quot;given&quot;:&quot;T&quot;},{&quot;family&quot;:&quot;Rodriguez&quot;,&quot;given&quot;:&quot;E. P&quot;},{&quot;family&quot;:&quot;Gao&quot;,&quot;given&quot;:&quot;X&quot;},{&quot;family&quot;:&quot;Ferreira&quot;,&quot;given&quot;:&quot;L. G&quot;}],&quot;issued&quot;:{&quot;date-parts&quot;:[[&quot;2002&quot;,11,1]]}}}],&quot;schema&quot;:&quot;https://github.com/citation-style-language/schema/raw/master/csl-citation.json&quot;} RND5IGz68SnoM"/><text:span text:style-name="T4">. EVI incorporates additional spectral information—specifically, the blue band—to correct for atmospheric scattering and includes terms to adjust for canopy background effects. The EVI is calculated as:</text:span></text:p>
      <text:p text:style-name="P1"/>
      <text:p text:style-name="P1">EVI = G × (NIR - Red) / (NIR + C1 × Red - C2 × Blue + L)</text:p>
      <text:p text:style-name="P1"/>
      <text:p text:style-name="P1">Where G is a gain factor, C1 and C2 are coefficients for the aerosol resistance term, and L is a canopy background adjustment. EVI provides improved sensitivity in high biomass regions and under varying atmospheric conditions, making it a useful complement to NDVI in tropical or heavily vegetated environments.</text:p>
      <text:p text:style-name="P1"/>
      <text:p text:style-name="P4">Surface moisture/water</text:p>
      <text:p text:style-name="P5"><text:span text:style-name="T3">The Normalized Difference Water Index (NDWI) is used to detect surface moisture and the presence of open water or saturated soils. Unlike NDVI and EVI, which are based on vegetation reflectance patterns, NDWI relies on the spectral contrast between near-infrared (NIR) and shortwave infrared (SWIR) reflectance. Water strongly absorbs SWIR wavelengths </text:span><text:reference-mark-start text:name="ZOTERO_ITEM CSL_CITATION {&quot;citationID&quot;:&quot;hOmT2SXb&quot;,&quot;properties&quot;:{&quot;formattedCitation&quot;:&quot;[8]&quot;,&quot;plainCitation&quot;:&quot;[8]&quot;,&quot;noteIndex&quot;:0},&quot;citationItems&quot;:[{&quot;id&quot;:369,&quot;uris&quot;:[&quot;http://zotero.org/users/5464174/items/C2FV4QMM&quot;],&quot;itemData&quot;:{&quot;id&quot;:369,&quot;type&quot;:&quot;article-journal&quot;,&quot;abstract&quot;:&quot;Extinction coefficients k(λ) for water at 25°C were determined through a broad spectral region by manually smoothing a point by point graph of k(λ) vs wavelength λ that was plotted for data obtained from a review of the scientific literature on the optical constants of water. Absorption bands representing k(λ) were postulated where data were not available in the vacuum uv and soft x-ray regions. A subtractive Kramers-Kronig analysis of the combined postulated and smoothed portions of the k(λ) spectrum provided the index of refraction n(λ) for the spectral region 200 nm ≤ λ ≤ 200 μm.&quot;,&quot;container-title&quot;:&quot;Applied Optics&quot;,&quot;DOI&quot;:&quot;10.1364/AO.12.000555&quot;,&quot;ISSN&quot;:&quot;2155-3165&quot;,&quot;issue&quot;:&quot;3&quot;,&quot;journalAbbreviation&quot;:&quot;Appl. Opt., AO&quot;,&quot;language&quot;:&quot;EN&quot;,&quot;license&quot;:&quot;&amp;#169; 1973 Optical Society of America&quot;,&quot;page&quot;:&quot;555-563&quot;,&quot;source&quot;:&quot;www.osapublishing.org&quot;,&quot;title&quot;:&quot;Optical Constants of Water in the 200-nm to 200-μm Wavelength Region&quot;,&quot;volume&quot;:&quot;12&quot;,&quot;author&quot;:[{&quot;family&quot;:&quot;Hale&quot;,&quot;given&quot;:&quot;George M.&quot;},{&quot;family&quot;:&quot;Querry&quot;,&quot;given&quot;:&quot;Marvin R.&quot;}],&quot;issued&quot;:{&quot;date-parts&quot;:[[&quot;1973&quot;,3,1]]}}}],&quot;schema&quot;:&quot;https://github.com/citation-style-language/schema/raw/master/csl-citation.json&quot;} RNDztR3e4yt0X"/><text:span text:style-name="T3">[8]</text:span><text:reference-mark-end text:name="ZOTERO_ITEM CSL_CITATION {&quot;citationID&quot;:&quot;hOmT2SXb&quot;,&quot;properties&quot;:{&quot;formattedCitation&quot;:&quot;[8]&quot;,&quot;plainCitation&quot;:&quot;[8]&quot;,&quot;noteIndex&quot;:0},&quot;citationItems&quot;:[{&quot;id&quot;:369,&quot;uris&quot;:[&quot;http://zotero.org/users/5464174/items/C2FV4QMM&quot;],&quot;itemData&quot;:{&quot;id&quot;:369,&quot;type&quot;:&quot;article-journal&quot;,&quot;abstract&quot;:&quot;Extinction coefficients k(λ) for water at 25°C were determined through a broad spectral region by manually smoothing a point by point graph of k(λ) vs wavelength λ that was plotted for data obtained from a review of the scientific literature on the optical constants of water. Absorption bands representing k(λ) were postulated where data were not available in the vacuum uv and soft x-ray regions. A subtractive Kramers-Kronig analysis of the combined postulated and smoothed portions of the k(λ) spectrum provided the index of refraction n(λ) for the spectral region 200 nm ≤ λ ≤ 200 μm.&quot;,&quot;container-title&quot;:&quot;Applied Optics&quot;,&quot;DOI&quot;:&quot;10.1364/AO.12.000555&quot;,&quot;ISSN&quot;:&quot;2155-3165&quot;,&quot;issue&quot;:&quot;3&quot;,&quot;journalAbbreviation&quot;:&quot;Appl. Opt., AO&quot;,&quot;language&quot;:&quot;EN&quot;,&quot;license&quot;:&quot;&amp;#169; 1973 Optical Society of America&quot;,&quot;page&quot;:&quot;555-563&quot;,&quot;source&quot;:&quot;www.osapublishing.org&quot;,&quot;title&quot;:&quot;Optical Constants of Water in the 200-nm to 200-μm Wavelength Region&quot;,&quot;volume&quot;:&quot;12&quot;,&quot;author&quot;:[{&quot;family&quot;:&quot;Hale&quot;,&quot;given&quot;:&quot;George M.&quot;},{&quot;family&quot;:&quot;Querry&quot;,&quot;given&quot;:&quot;Marvin R.&quot;}],&quot;issued&quot;:{&quot;date-parts&quot;:[[&quot;1973&quot;,3,1]]}}}],&quot;schema&quot;:&quot;https://github.com/citation-style-language/schema/raw/master/csl-citation.json&quot;} RNDztR3e4yt0X"/><text:span text:style-name="T3">, while vegetation and soil tend to reflect more. The NDWI we use here </text:span><text:reference-mark-start text:name="ZOTERO_ITEM CSL_CITATION {&quot;citationID&quot;:&quot;IsZA7RHT&quot;,&quot;properties&quot;:{&quot;formattedCitation&quot;:&quot;[9]&quot;,&quot;plainCitation&quot;:&quot;[9]&quot;,&quot;noteIndex&quot;:0},&quot;citationItems&quot;:[{&quot;id&quot;:1808,&quot;uris&quot;:[&quot;http://zotero.org/users/5464174/items/MD36Q2LD&quot;],&quot;itemData&quot;:{&quot;id&quot;:1808,&quot;type&quot;:&quot;article-journal&quot;,&quot;abstract&quot;:&quot;Identifying managed flooding in paddy fields is commonly used in remote sensing to detect rice. Such flooding, followed by rapid vegetation growth, is a reliable indicator to discriminate rice. Spectral indices (SIs) are often used to perform this task. However, little work has been done on determining which spectral combination in the form of Normalised Difference Spectral Indices (NDSIs) is most appropriate for surface water detection or which thresholds are most robust to separate water from other surfaces in operational contexts. To address this, we conducted analyses on satellite and field spectral data from an agronomic experiment as well as on real farming situations with different soil and plant conditions. Firstly, we review and select NDSIs proposed in the literature, including a new combination of visible and shortwave infrared bands. Secondly, we analyse spectroradiometric field data and satellite data to evaluate mixed pixel effects. Thirdly, we analyse MODIS data and Landsat data at four sites in Europe and Asia to assess NDSI performance in real-world conditions. Finally, we test the performance of the NDSIs on MODIS temporal profiles in the four sites. We also compared the NDSIs against a combined index previously used for agronomic flood detection. Analyses suggest that NDSIs using MODIS bands 4 and 7, 1 and 7, 4 and 6 or 1 and 6 perform best. A common threshold for each NDSI across all sites was more appropriate than locally adaptive thresholds. In general, NDSIs that use band 7 have a negligible increase in Commission Error over those that use band 6 but are more sensitive to water presence in mixed land cover conditions typical of moderate spatial resolution analyses. The best performing NDSI is comparable to the combined index but with less variability in performance across sites, suggesting a more succinct and robust flood detection method.&quot;,&quot;container-title&quot;:&quot;PLoS ONE&quot;,&quot;DOI&quot;:&quot;10.1371/journal.pone.0088741&quot;,&quot;ISSN&quot;:&quot;1932-6203&quot;,&quot;issue&quot;:&quot;2&quot;,&quot;language&quot;:&quot;en&quot;,&quot;page&quot;:&quot;e88741&quot;,&quot;source&quot;:&quot;Crossref&quot;,&quot;title&quot;:&quot;Comparative Analysis of Normalised Difference Spectral Indices Derived from MODIS for Detecting Surface Water in Flooded Rice Cropping Systems&quot;,&quot;volume&quot;:&quot;9&quot;,&quot;author&quot;:[{&quot;family&quot;:&quot;Boschetti&quot;,&quot;given&quot;:&quot;Mirco&quot;},{&quot;family&quot;:&quot;Nutini&quot;,&quot;given&quot;:&quot;Francesco&quot;},{&quot;family&quot;:&quot;Manfron&quot;,&quot;given&quot;:&quot;Giacinto&quot;},{&quot;family&quot;:&quot;Brivio&quot;,&quot;given&quot;:&quot;Pietro Alessandro&quot;},{&quot;family&quot;:&quot;Nelson&quot;,&quot;given&quot;:&quot;Andrew&quot;}],&quot;editor&quot;:[{&quot;family&quot;:&quot;Schumann&quot;,&quot;given&quot;:&quot;Guy J.-P.&quot;}],&quot;issued&quot;:{&quot;date-parts&quot;:[[&quot;2014&quot;,2,20]]}}}],&quot;schema&quot;:&quot;https://github.com/citation-style-language/schema/raw/master/csl-citation.json&quot;} RNDyHhRS31g7f"/><text:span text:style-name="T3">[9]</text:span><text:reference-mark-end text:name="ZOTERO_ITEM CSL_CITATION {&quot;citationID&quot;:&quot;IsZA7RHT&quot;,&quot;properties&quot;:{&quot;formattedCitation&quot;:&quot;[9]&quot;,&quot;plainCitation&quot;:&quot;[9]&quot;,&quot;noteIndex&quot;:0},&quot;citationItems&quot;:[{&quot;id&quot;:1808,&quot;uris&quot;:[&quot;http://zotero.org/users/5464174/items/MD36Q2LD&quot;],&quot;itemData&quot;:{&quot;id&quot;:1808,&quot;type&quot;:&quot;article-journal&quot;,&quot;abstract&quot;:&quot;Identifying managed flooding in paddy fields is commonly used in remote sensing to detect rice. Such flooding, followed by rapid vegetation growth, is a reliable indicator to discriminate rice. Spectral indices (SIs) are often used to perform this task. However, little work has been done on determining which spectral combination in the form of Normalised Difference Spectral Indices (NDSIs) is most appropriate for surface water detection or which thresholds are most robust to separate water from other surfaces in operational contexts. To address this, we conducted analyses on satellite and field spectral data from an agronomic experiment as well as on real farming situations with different soil and plant conditions. Firstly, we review and select NDSIs proposed in the literature, including a new combination of visible and shortwave infrared bands. Secondly, we analyse spectroradiometric field data and satellite data to evaluate mixed pixel effects. Thirdly, we analyse MODIS data and Landsat data at four sites in Europe and Asia to assess NDSI performance in real-world conditions. Finally, we test the performance of the NDSIs on MODIS temporal profiles in the four sites. We also compared the NDSIs against a combined index previously used for agronomic flood detection. Analyses suggest that NDSIs using MODIS bands 4 and 7, 1 and 7, 4 and 6 or 1 and 6 perform best. A common threshold for each NDSI across all sites was more appropriate than locally adaptive thresholds. In general, NDSIs that use band 7 have a negligible increase in Commission Error over those that use band 6 but are more sensitive to water presence in mixed land cover conditions typical of moderate spatial resolution analyses. The best performing NDSI is comparable to the combined index but with less variability in performance across sites, suggesting a more succinct and robust flood detection method.&quot;,&quot;container-title&quot;:&quot;PLoS ONE&quot;,&quot;DOI&quot;:&quot;10.1371/journal.pone.0088741&quot;,&quot;ISSN&quot;:&quot;1932-6203&quot;,&quot;issue&quot;:&quot;2&quot;,&quot;language&quot;:&quot;en&quot;,&quot;page&quot;:&quot;e88741&quot;,&quot;source&quot;:&quot;Crossref&quot;,&quot;title&quot;:&quot;Comparative Analysis of Normalised Difference Spectral Indices Derived from MODIS for Detecting Surface Water in Flooded Rice Cropping Systems&quot;,&quot;volume&quot;:&quot;9&quot;,&quot;author&quot;:[{&quot;family&quot;:&quot;Boschetti&quot;,&quot;given&quot;:&quot;Mirco&quot;},{&quot;family&quot;:&quot;Nutini&quot;,&quot;given&quot;:&quot;Francesco&quot;},{&quot;family&quot;:&quot;Manfron&quot;,&quot;given&quot;:&quot;Giacinto&quot;},{&quot;family&quot;:&quot;Brivio&quot;,&quot;given&quot;:&quot;Pietro Alessandro&quot;},{&quot;family&quot;:&quot;Nelson&quot;,&quot;given&quot;:&quot;Andrew&quot;}],&quot;editor&quot;:[{&quot;family&quot;:&quot;Schumann&quot;,&quot;given&quot;:&quot;Guy J.-P.&quot;}],&quot;issued&quot;:{&quot;date-parts&quot;:[[&quot;2014&quot;,2,20]]}}}],&quot;schema&quot;:&quot;https://github.com/citation-style-language/schema/raw/master/csl-citation.json&quot;} RNDyHhRS31g7f"/><text:span text:style-name="T3"> is calculated as:</text:span></text:p>
      <text:p text:style-name="P3"/>
      <text:p text:style-name="P3">NDWI = (NIR - SWIR) / (NIR + SWIR)</text:p>
      <text:p text:style-name="P3"/>
      <text:p text:style-name="Standard"><text:span text:style-name="T3">Higher NDWI values indicate wetter conditions, while lower values reflect drier surfaces or areas with little to no water content. NDWI is commonly used to monitor drought, detect standing water after floods, and assess wetland dynamics or fire scars. The specific SWIR band used typically centers around ~1640 nm (SWIR2), which has been shown to be especially effective for distinguishing water bodies from other land cover types.</text:span></text:p>
      <text:p text:style-name="P3"/>
      <text:p text:style-name="P3"><text:span text:style-name="T6">NDWI</text:span> responds to changes in surface moisture, <text:span text:style-name="T6">making it valuable and complimentary to</text:span> vegetation indices, especially in studies of climate, land cover change, and hydrological processes.</text:p>
      <text:p text:style-name="P1"/>
      <text:p text:style-name="Standard"/>
      <text:section text:style-name="Sect1" text:name="ZOTERO_BIBL {&quot;uncited&quot;:[],&quot;omitted&quot;:[],&quot;custom&quot;:[]} CSL_BIBLIOGRAPHY RND1hX7ayMeHM">
        <text:p text:style-name="Bibliography_20_1">1. <text:tab/>Muñoz-Sabater J, Dutra E, Agustí-Panareda A, Albergel C, Arduini G, Balsamo G, et al. ERA5-Land: a state-of-the-art global reanalysis dataset for land applications. Earth System Science Data. 2021;13: 4349–4383. doi:10.5194/essd-13-4349-2021</text:p>
        <text:p text:style-name="Bibliography_20_1">2. <text:tab/>ERA5-Land hourly data from 1950 to present. [cited 29 Mar 2025]. Available: https://cds.climate.copernicus.eu/datasets/reanalysis-era5-land?tab=overview</text:p>
        <text:p text:style-name="Bibliography_20_1">3. <text:tab/>Wan Z, Hook S, Hulley G. MOD11A2 MODIS/Terra Land Surface Temperature/Emissivity 8-Day L3 Global 1km SIN Grid V006. NASA EOSDIS Land Processes Distributed Active Archive Center; 2015. doi:10.5067/MODIS/MOD11A2.006</text:p>
        <text:p text:style-name="Bibliography_20_1">4. <text:tab/>Cook M, Schott JR, Mandel J, Raqueno N. Development of an Operational Calibration Methodology for the Landsat Thermal Data Archive and Initial Testing of the Atmospheric Compensation Component of a Land Surface Temperature (LST) Product from the Archive. Remote Sensing. 2014;6: 11244–11266. doi:10.3390/rs61111244</text:p>
        <text:p text:style-name="Bibliography_20_1"><text:soft-page-break/>5. <text:tab/>Rouse J, Hass R, Deering D, Sehell J. Monitoring the vernal advancement and retrogradation (Green wave effect) of natural vegetation. 1974 p. 8. Report No.: E74-10676, NASA-CR-139243, PR-7. Available: https://ntrs.nasa.gov/archive/nasa/casi.ntrs.nasa.gov/19740022555.pdf</text:p>
        <text:p text:style-name="Bibliography_20_1">6. <text:tab/>Huete AR. A soil-adjusted vegetation index (SAVI). Remote Sensing of Environment. 1988;25: 295–309. doi:10.1016/0034-4257(88)90106-X</text:p>
        <text:p text:style-name="Bibliography_20_1">7. <text:tab/>Huete A, Didan K, Miura T, Rodriguez EP, Gao X, Ferreira LG. Overview of the radiometric and biophysical performance of the MODIS vegetation indices. Remote Sensing of Environment. 2002;83: 195–213. doi:10.1016/S0034-4257(02)00096-2</text:p>
        <text:p text:style-name="Bibliography_20_1">8. <text:tab/>Hale GM, Querry MR. Optical Constants of Water in the 200-nm to 200-μm Wavelength Region. Appl Opt, AO. 1973;12: 555–563. doi:10.1364/AO.12.000555</text:p>
        <text:p text:style-name="Bibliography_20_1">9. <text:tab/>Boschetti M, Nutini F, Manfron G, Brivio PA, Nelson A. Comparative Analysis of Normalised Difference Spectral Indices Derived from MODIS for Detecting Surface Water in Flooded Rice Cropping Systems. Schumann GJ-P, editor. PLoS ONE. 2014;9: e88741. doi:10.1371/journal.pone.0088741</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ibliography_20_1" style:display-name="Bibliography 1" style:family="paragraph" style:parent-style-name="Index" style:class="index">
      <style:paragraph-properties fo:margin-left="0.2665in" fo:margin-top="0in" fo:margin-bottom="0.1665in" style:contextual-spacing="false" style:line-height-at-least="0.1665in" fo:text-indent="-0.2665in" style:auto-text-indent="false">
        <style:tab-stops>
          <style:tab-stop style:position="0.2665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9T13:45:41.929000000</meta:creation-date>
    <dc:date>2025-03-30T19:01:43.420000000</dc:date>
    <meta:editing-duration>PT1H17M10S</meta:editing-duration>
    <meta:editing-cycles>3</meta:editing-cycles>
    <meta:generator>LibreOffice/7.6.5.2$Windows_X86_64 LibreOffice_project/38d5f62f85355c192ef5f1dd47c5c0c0c6d6598b</meta:generator>
    <meta:document-statistic meta:table-count="0" meta:image-count="0" meta:object-count="0" meta:page-count="3" meta:paragraph-count="28" meta:word-count="1071" meta:character-count="7409" meta:non-whitespace-character-count="6366"/>
    <meta:user-defined meta:name="ZOTERO_PREF_1">&lt;data data-version="3" zotero-version="7.0.15"&gt;&lt;session id="3UBuDsXG"/&gt;&lt;style id="http://www.zotero.org/styles/plos-pathogens" hasBibliography="1" bibliographyStyleHasBeenSet="1"/&gt;&lt;prefs&gt;&lt;pref name="fieldType" value="ReferenceMark"/&gt;&lt;/prefs&gt;&lt;/data&gt;</meta:user-defined>
  </office:meta>
</office:document-meta>
</file>